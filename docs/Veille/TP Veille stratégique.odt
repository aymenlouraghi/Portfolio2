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ymbol" svg:font-family="Segoe UI Symbol" style:font-family-generic="swiss" style:font-pitch="variable" svg:panose-1="2 11 5 2 4 2 4 2 2 3"/>
  </office:font-face-decls>
  <office:automatic-styles>
    <text:list-style style:name="LFO1">
      <text:list-level-style-bullet text:level="1" text:style-name="WW_CharLFO1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Symbol"/>
      </text:list-level-style-bullet>
      <text:list-level-style-bullet text:level="2" text:style-name="WW_CharLFO1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1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1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1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1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1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1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1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break-before="page" fo:text-align="center"/>
      <style:text-properties style:text-underline-type="single" style:text-underline-style="solid" style:text-underline-width="auto" style:text-underline-mode="continuous"/>
    </style:style>
    <style:style style:name="T2" style:parent-style-name="Policepardéfaut" style:family="text">
      <style:text-properties style:text-underline-type="single" style:text-underline-style="solid" style:text-underline-width="auto" style:text-underline-mode="continuous"/>
    </style:style>
    <style:style style:name="P3" style:parent-style-name="Paragraphedeliste" style:list-style-name="LFO1" style:family="paragraph"/>
    <style:style style:name="P4" style:parent-style-name="Paragraphedeliste" style:list-style-name="LFO1" style:family="paragraph"/>
    <style:style style:name="P5" style:parent-style-name="Paragraphedeliste" style:list-style-name="LFO1" style:family="paragraph"/>
    <style:style style:name="P6" style:parent-style-name="Paragraphedeliste" style:list-style-name="LFO1" style:family="paragraph"/>
    <style:style style:name="P7" style:parent-style-name="Paragraphedeliste" style:list-style-name="LFO1" style:family="paragraph"/>
    <style:style style:name="T8" style:parent-style-name="Policepardéfaut" style:family="text">
      <style:text-properties style:text-underline-type="single" style:text-underline-style="solid" style:text-underline-width="auto" style:text-underline-mode="continuous"/>
    </style:style>
    <style:style style:name="P9" style:parent-style-name="Normal" style:family="paragraph">
      <style:text-properties style:text-underline-type="single" style:text-underline-style="solid" style:text-underline-width="auto" style:text-underline-mode="continuous"/>
    </style:style>
    <style:style style:name="P10" style:parent-style-name="Normal" style:family="paragraph">
      <style:text-properties style:text-underline-type="single" style:text-underline-style="solid" style:text-underline-width="auto" style:text-underline-mode="continuous"/>
    </style:style>
    <style:style style:name="P11" style:parent-style-name="Normal" style:family="paragraph">
      <style:text-properties style:text-underline-type="single" style:text-underline-style="solid" style:text-underline-width="auto" style:text-underline-mode="continuous"/>
    </style:style>
    <style:style style:name="P12" style:parent-style-name="Titre2" style:family="paragraph">
      <style:text-properties style:text-underline-type="single" style:text-underline-style="solid" style:text-underline-width="auto" style:text-underline-mode="continuous"/>
    </style:style>
    <style:style style:name="T13" style:parent-style-name="Policepardéfaut" style:family="text">
      <style:text-properties style:text-underline-type="single" style:text-underline-style="solid" style:text-underline-width="auto" style:text-underline-mode="continuous"/>
    </style:style>
    <style:style style:name="T14" style:parent-style-name="Policepardéfaut" style:family="text">
      <style:text-properties style:text-underline-type="single" style:text-underline-style="solid" style:text-underline-width="auto" style:text-underline-mode="continuous"/>
    </style:style>
    <style:style style:name="P15" style:parent-style-name="Normal" style:family="paragraph">
      <style:text-properties style:text-underline-type="single" style:text-underline-style="solid" style:text-underline-width="auto" style:text-underline-mode="continuous"/>
    </style:style>
    <style:style style:name="P16" style:parent-style-name="Paragraphedeliste" style:list-style-name="LFO1" style:family="paragraph"/>
    <style:style style:name="P17" style:parent-style-name="Paragraphedeliste" style:list-style-name="LFO1" style:family="paragraph"/>
    <style:style style:name="P18" style:parent-style-name="Paragraphedeliste" style:list-style-name="LFO1" style:family="paragraph"/>
    <style:style style:name="P19" style:parent-style-name="Titre2" style:family="paragraph">
      <style:text-properties style:text-underline-type="single" style:text-underline-style="solid" style:text-underline-width="auto" style:text-underline-mode="continuous"/>
    </style:style>
    <style:style style:name="P20" style:parent-style-name="Paragraphedeliste" style:list-style-name="LFO2" style:family="paragraph"/>
    <style:style style:name="P21" style:parent-style-name="Paragraphedeliste" style:list-style-name="LFO2" style:family="paragraph"/>
    <style:style style:name="P22" style:parent-style-name="Paragraphedeliste" style:list-style-name="LFO2" style:family="paragraph"/>
    <style:style style:name="P23" style:parent-style-name="Paragraphedeliste" style:list-style-name="LFO2" style:family="paragraph"/>
    <style:style style:name="P24" style:parent-style-name="Paragraphedeliste" style:list-style-name="LFO2" style:family="paragraph"/>
    <style:style style:name="P25" style:parent-style-name="Paragraphedeliste" style:list-style-name="LFO2" style:family="paragraph"/>
    <style:style style:name="P26"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27" style:parent-style-name="Titre1" style:list-style-name="LFO3" style:family="paragraph">
      <style:text-properties style:text-underline-type="single" style:text-underline-style="solid" style:text-underline-width="auto" style:text-underline-mode="continuous"/>
    </style:style>
    <style:style style:name="P28" style:parent-style-name="Titre2" style:family="paragraph">
      <style:text-properties fo:color="#000000" style:text-underline-type="single" style:text-underline-style="solid" style:text-underline-width="auto" style:text-underline-mode="continuous"/>
    </style:style>
    <style:style style:name="P29" style:parent-style-name="Normal" style:family="paragraph">
      <style:text-properties fo:font-weight="bold" style:font-weight-asian="bold" style:font-weight-complex="bold" fo:font-size="14pt" style:font-size-asian="14pt" style:font-size-complex="14pt"/>
    </style:style>
    <style:style style:name="P30" style:parent-style-name="Normal" style:list-style-name="LFO4" style:family="paragraph"/>
    <style:style style:name="T31" style:parent-style-name="Policepardéfaut" style:family="text">
      <style:text-properties fo:font-weight="bold" style:font-weight-asian="bold" style:font-weight-complex="bold"/>
    </style:style>
    <style:style style:name="P32" style:parent-style-name="Normal" style:list-style-name="LFO4" style:family="paragraph"/>
    <style:style style:name="T33" style:parent-style-name="Policepardéfaut" style:family="text">
      <style:text-properties fo:font-weight="bold" style:font-weight-asian="bold" style:font-weight-complex="bold"/>
    </style:style>
    <style:style style:name="P34" style:parent-style-name="Normal" style:list-style-name="LFO4" style:family="paragraph"/>
    <style:style style:name="T35" style:parent-style-name="Policepardéfaut" style:family="text">
      <style:text-properties fo:font-weight="bold" style:font-weight-asian="bold" style:font-weight-complex="bold"/>
    </style:style>
    <style:style style:name="P36" style:parent-style-name="Normal" style:list-style-name="LFO4" style:family="paragraph"/>
    <style:style style:name="T37" style:parent-style-name="Policepardéfaut" style:family="text">
      <style:text-properties fo:font-weight="bold" style:font-weight-asian="bold" style:font-weight-complex="bold"/>
    </style:style>
    <style:style style:name="P38" style:parent-style-name="Normal" style:family="paragraph">
      <style:text-properties fo:font-weight="bold" style:font-weight-asian="bold" style:font-weight-complex="bold" fo:font-size="14pt" style:font-size-asian="14pt" style:font-size-complex="14pt"/>
    </style:style>
    <style:style style:name="P39" style:parent-style-name="Normal" style:list-style-name="LFO5" style:family="paragraph"/>
    <style:style style:name="T40" style:parent-style-name="Policepardéfaut" style:family="text">
      <style:text-properties fo:font-weight="bold" style:font-weight-asian="bold" style:font-weight-complex="bold"/>
    </style:style>
    <style:style style:name="P41" style:parent-style-name="Normal" style:list-style-name="LFO5" style:family="paragraph"/>
    <style:style style:name="T42" style:parent-style-name="Policepardéfaut" style:family="text">
      <style:text-properties fo:font-weight="bold" style:font-weight-asian="bold" style:font-weight-complex="bold"/>
    </style:style>
    <style:style style:name="P43" style:parent-style-name="Normal" style:list-style-name="LFO5" style:family="paragraph"/>
    <style:style style:name="T44" style:parent-style-name="Policepardéfaut" style:family="text">
      <style:text-properties fo:font-weight="bold" style:font-weight-asian="bold" style:font-weight-complex="bold"/>
    </style:style>
    <style:style style:name="P45" style:parent-style-name="Normal" style:list-style-name="LFO5" style:family="paragraph"/>
    <style:style style:name="T46" style:parent-style-name="Policepardéfaut" style:family="text">
      <style:text-properties fo:font-weight="bold" style:font-weight-asian="bold" style:font-weight-complex="bold"/>
    </style:style>
    <style:style style:name="P47" style:parent-style-name="Normal" style:family="paragraph">
      <style:text-properties fo:font-weight="bold" style:font-weight-asian="bold" style:font-weight-complex="bold" fo:font-size="14pt" style:font-size-asian="14pt" style:font-size-complex="14pt"/>
    </style:style>
    <style:style style:name="P48" style:parent-style-name="Normal" style:list-style-name="LFO6" style:family="paragraph"/>
    <style:style style:name="P49" style:parent-style-name="Normal" style:list-style-name="LFO6" style:family="paragraph"/>
    <style:style style:name="P50" style:parent-style-name="Normal" style:list-style-name="LFO6" style:family="paragraph"/>
    <style:style style:name="P51" style:parent-style-name="Normal" style:family="paragraph">
      <style:paragraph-properties fo:margin-left="0.25in">
        <style:tab-stops/>
      </style:paragraph-properties>
    </style:style>
    <style:style style:name="P52" style:parent-style-name="Titre2" style:family="paragraph">
      <style:text-properties style:use-window-font-color="true" style:text-underline-type="single" style:text-underline-style="solid" style:text-underline-width="auto" style:text-underline-mode="continuous"/>
    </style:style>
    <style:style style:name="P53" style:parent-style-name="Normal" style:family="paragraph">
      <style:paragraph-properties fo:margin-left="0.25in">
        <style:tab-stops/>
      </style:paragraph-properties>
    </style:style>
    <style:style style:name="P54" style:parent-style-name="Normal" style:family="paragraph">
      <style:paragraph-properties fo:margin-left="0.25in">
        <style:tab-stops/>
      </style:paragraph-properties>
      <style:text-properties fo:font-weight="bold" style:font-weight-asian="bold" style:font-weight-complex="bold"/>
    </style:style>
    <style:style style:name="P55" style:parent-style-name="Normal" style:family="paragraph">
      <style:paragraph-properties fo:margin-left="0.25in">
        <style:tab-stops/>
      </style:paragraph-properties>
      <style:text-properties fo:font-weight="bold" style:font-weight-asian="bold" style:font-weight-complex="bold"/>
    </style:style>
    <style:style style:name="P56" style:parent-style-name="Normal" style:list-style-name="LFO7" style:family="paragraph"/>
    <style:style style:name="T57" style:parent-style-name="Policepardéfaut" style:family="text">
      <style:text-properties fo:font-weight="bold" style:font-weight-asian="bold" style:font-weight-complex="bold"/>
    </style:style>
    <style:style style:name="P58" style:parent-style-name="Normal" style:list-style-name="LFO7" style:family="paragraph"/>
    <style:style style:name="T59" style:parent-style-name="Policepardéfaut" style:family="text">
      <style:text-properties fo:font-weight="bold" style:font-weight-asian="bold" style:font-weight-complex="bold"/>
    </style:style>
    <style:style style:name="P60" style:parent-style-name="Normal" style:list-style-name="LFO7" style:family="paragraph"/>
    <style:style style:name="T61" style:parent-style-name="Policepardéfaut" style:family="text">
      <style:text-properties fo:font-weight="bold" style:font-weight-asian="bold" style:font-weight-complex="bold"/>
    </style:style>
    <style:style style:name="P62" style:parent-style-name="Normal" style:list-style-name="LFO7" style:family="paragraph"/>
    <style:style style:name="T63" style:parent-style-name="Policepardéfaut" style:family="text">
      <style:text-properties fo:font-weight="bold" style:font-weight-asian="bold" style:font-weight-complex="bold"/>
    </style:style>
    <style:style style:name="P64" style:parent-style-name="Normal" style:list-style-name="LFO7" style:family="paragraph"/>
    <style:style style:name="T65" style:parent-style-name="Policepardéfaut" style:family="text">
      <style:text-properties fo:font-weight="bold" style:font-weight-asian="bold" style:font-weight-complex="bold"/>
    </style:style>
    <style:style style:name="P66" style:parent-style-name="Normal" style:family="paragraph">
      <style:paragraph-properties fo:margin-left="0.25in">
        <style:tab-stops/>
      </style:paragraph-properties>
      <style:text-properties fo:font-weight="bold" style:font-weight-asian="bold" style:font-weight-complex="bold"/>
    </style:style>
    <style:style style:name="P67" style:parent-style-name="Normal" style:family="paragraph">
      <style:paragraph-properties fo:margin-left="0.25in">
        <style:tab-stops/>
      </style:paragraph-properties>
    </style:style>
    <style:style style:name="P68" style:parent-style-name="Normal" style:family="paragraph">
      <style:paragraph-properties fo:margin-left="0.25in">
        <style:tab-stops/>
      </style:paragraph-properties>
    </style:style>
    <style:style style:name="P69" style:parent-style-name="Titre2" style:family="paragraph">
      <style:text-properties style:use-window-font-color="true" style:text-underline-type="single" style:text-underline-style="solid" style:text-underline-width="auto" style:text-underline-mode="continuous"/>
    </style:style>
    <style:style style:name="P70" style:parent-style-name="Normal" style:family="paragraph">
      <style:paragraph-properties fo:margin-left="0.25in">
        <style:tab-stops/>
      </style:paragraph-properties>
      <style:text-properties fo:font-weight="bold" style:font-weight-asian="bold" style:font-weight-complex="bold" fo:font-size="14pt" style:font-size-asian="14pt" style:font-size-complex="14pt"/>
    </style:style>
    <style:style style:name="P71" style:parent-style-name="Normal" style:family="paragraph">
      <style:paragraph-properties fo:margin-left="0.25in">
        <style:tab-stops/>
      </style:paragraph-properties>
    </style:style>
    <style:style style:name="P72" style:parent-style-name="Normal" style:family="paragraph">
      <style:paragraph-properties fo:margin-left="0.25in">
        <style:tab-stops/>
      </style:paragraph-properties>
      <style:text-properties fo:font-weight="bold" style:font-weight-asian="bold" style:font-weight-complex="bold"/>
    </style:style>
    <style:style style:name="P73" style:parent-style-name="Normal" style:list-style-name="LFO8" style:family="paragraph"/>
    <style:style style:name="P74" style:parent-style-name="Normal" style:list-style-name="LFO8" style:family="paragraph"/>
    <style:style style:name="P75" style:parent-style-name="Normal" style:list-style-name="LFO8" style:family="paragraph"/>
    <style:style style:name="P76" style:parent-style-name="Normal" style:family="paragraph">
      <style:paragraph-properties fo:margin-left="0.25in">
        <style:tab-stops/>
      </style:paragraph-properties>
      <style:text-properties fo:font-weight="bold" style:font-weight-asian="bold" style:font-weight-complex="bold"/>
    </style:style>
    <style:style style:name="P77" style:parent-style-name="Normal" style:list-style-name="LFO9" style:family="paragraph"/>
    <style:style style:name="P78" style:parent-style-name="Normal" style:list-style-name="LFO9" style:family="paragraph"/>
    <style:style style:name="P79" style:parent-style-name="Normal" style:family="paragraph">
      <style:paragraph-properties fo:margin-left="0.25in">
        <style:tab-stops/>
      </style:paragraph-properties>
      <style:text-properties fo:font-weight="bold" style:font-weight-asian="bold" style:font-weight-complex="bold"/>
    </style:style>
    <style:style style:name="P80" style:parent-style-name="Normal" style:list-style-name="LFO10" style:family="paragraph"/>
    <style:style style:name="P81" style:parent-style-name="Normal" style:list-style-name="LFO10" style:family="paragraph"/>
    <style:style style:name="P82" style:parent-style-name="Normal" style:list-style-name="LFO10" style:family="paragraph"/>
    <style:style style:name="P83" style:parent-style-name="Titre2" style:family="paragraph">
      <style:text-properties style:use-window-font-color="true" style:text-underline-type="single" style:text-underline-style="solid" style:text-underline-width="auto" style:text-underline-mode="continuous"/>
    </style:style>
    <style:style style:name="P84" style:parent-style-name="Normal" style:family="paragraph">
      <style:paragraph-properties fo:margin-left="0.25in">
        <style:tab-stops/>
      </style:paragraph-properties>
      <style:text-properties fo:font-weight="bold" style:font-weight-asian="bold" style:font-weight-complex="bold" fo:font-size="14pt" style:font-size-asian="14pt" style:font-size-complex="14pt"/>
    </style:style>
    <style:style style:name="P85" style:parent-style-name="Normal" style:family="paragraph">
      <style:paragraph-properties fo:margin-left="0.25in">
        <style:tab-stops/>
      </style:paragraph-properties>
    </style:style>
    <style:style style:name="P86" style:parent-style-name="Normal" style:list-style-name="LFO11" style:family="paragraph"/>
    <style:style style:name="T87" style:parent-style-name="Policepardéfaut" style:family="text">
      <style:text-properties fo:font-weight="bold" style:font-weight-asian="bold" style:font-weight-complex="bold"/>
    </style:style>
    <style:style style:name="P88" style:parent-style-name="Normal" style:list-style-name="LFO11" style:family="paragraph"/>
    <style:style style:name="T89" style:parent-style-name="Policepardéfaut" style:family="text">
      <style:text-properties fo:font-weight="bold" style:font-weight-asian="bold" style:font-weight-complex="bold"/>
    </style:style>
    <style:style style:name="P90" style:parent-style-name="Normal" style:list-style-name="LFO11" style:family="paragraph"/>
    <style:style style:name="T91" style:parent-style-name="Policepardéfaut" style:family="text">
      <style:text-properties fo:font-weight="bold" style:font-weight-asian="bold" style:font-weight-complex="bold"/>
    </style:style>
    <style:style style:name="P92" style:parent-style-name="Titre2" style:family="paragraph">
      <style:text-properties style:use-window-font-color="true" style:text-underline-type="single" style:text-underline-style="solid" style:text-underline-width="auto" style:text-underline-mode="continuous"/>
    </style:style>
    <style:style style:name="P93" style:parent-style-name="Normal" style:family="paragraph">
      <style:text-properties fo:font-weight="bold" style:font-weight-asian="bold" style:font-weight-complex="bold" fo:font-size="14pt" style:font-size-asian="14pt" style:font-size-complex="14pt"/>
    </style:style>
    <style:style style:name="T94" style:parent-style-name="Policepardéfaut" style:family="text">
      <style:text-properties fo:font-weight="bold" style:font-weight-asian="bold" style:font-weight-complex="bold"/>
    </style:style>
    <style:style style:name="P95" style:parent-style-name="Normal" style:family="paragraph">
      <style:text-properties fo:font-weight="bold" style:font-weight-asian="bold" style:font-weight-complex="bold"/>
    </style:style>
    <style:style style:name="P96" style:parent-style-name="Normal" style:list-style-name="LFO12" style:family="paragraph"/>
    <style:style style:name="T97" style:parent-style-name="Policepardéfaut" style:family="text">
      <style:text-properties fo:font-weight="bold" style:font-weight-asian="bold" style:font-weight-complex="bold"/>
    </style:style>
    <style:style style:name="P98" style:parent-style-name="Paragraphedeliste" style:list-style-name="LFO12" style:family="paragraph"/>
    <style:style style:name="P99" style:parent-style-name="Normal" style:list-style-name="LFO12" style:family="paragraph"/>
    <style:style style:name="P100" style:parent-style-name="Normal" style:list-style-name="LFO12" style:family="paragraph"/>
    <style:style style:name="T101" style:parent-style-name="Policepardéfaut" style:family="text">
      <style:text-properties fo:font-weight="bold" style:font-weight-asian="bold" style:font-weight-complex="bold"/>
    </style:style>
    <style:style style:name="P102" style:parent-style-name="Normal" style:family="paragraph">
      <style:text-properties fo:font-weight="bold" style:font-weight-asian="bold" style:font-weight-complex="bold"/>
    </style:style>
    <style:style style:name="P103" style:parent-style-name="Normal" style:list-style-name="LFO13" style:family="paragraph"/>
    <style:style style:name="T104" style:parent-style-name="Policepardéfaut" style:family="text">
      <style:text-properties fo:font-weight="bold" style:font-weight-asian="bold" style:font-weight-complex="bold"/>
    </style:style>
    <style:style style:name="T105" style:parent-style-name="Policepardéfaut" style:family="text">
      <style:text-properties fo:font-weight="bold" style:font-weight-asian="bold" style:font-weight-complex="bold"/>
    </style:style>
    <style:style style:name="P106" style:parent-style-name="Titre1" style:list-style-name="LFO3" style:family="paragraph">
      <style:text-properties style:text-underline-type="single" style:text-underline-style="solid" style:text-underline-width="auto" style:text-underline-mode="continuous"/>
    </style:style>
    <style:style style:name="P107" style:parent-style-name="Titre2" style:family="paragraph">
      <style:text-properties style:use-window-font-color="true" style:text-underline-type="single" style:text-underline-style="solid" style:text-underline-width="auto" style:text-underline-mode="continuous"/>
    </style:style>
    <style:style style:name="P108" style:parent-style-name="Normal" style:family="paragraph">
      <style:text-properties fo:font-weight="bold" style:font-weight-asian="bold" style:font-weight-complex="bold" fo:font-size="14pt" style:font-size-asian="14pt" style:font-size-complex="14pt"/>
    </style:style>
    <style:style style:name="P109" style:parent-style-name="Normal" style:family="paragraph">
      <style:text-properties fo:font-weight="bold" style:font-weight-asian="bold" style:font-weight-complex="bold"/>
    </style:style>
    <style:style style:name="P110" style:parent-style-name="Normal" style:list-style-name="LFO14" style:family="paragraph"/>
    <style:style style:name="T111" style:parent-style-name="Policepardéfaut" style:family="text">
      <style:text-properties fo:font-weight="bold" style:font-weight-asian="bold" style:font-weight-complex="bold"/>
    </style:style>
    <style:style style:name="P112" style:parent-style-name="Normal" style:list-style-name="LFO14" style:family="paragraph"/>
    <style:style style:name="T113" style:parent-style-name="Policepardéfaut" style:family="text">
      <style:text-properties fo:font-weight="bold" style:font-weight-asian="bold" style:font-weight-complex="bold"/>
    </style:style>
    <style:style style:name="P114" style:parent-style-name="Normal" style:list-style-name="LFO14" style:family="paragraph"/>
    <style:style style:name="T115" style:parent-style-name="Policepardéfaut" style:family="text">
      <style:text-properties fo:font-weight="bold" style:font-weight-asian="bold" style:font-weight-complex="bold"/>
    </style:style>
    <style:style style:name="P116" style:parent-style-name="Normal" style:list-style-name="LFO14" style:family="paragraph"/>
    <style:style style:name="T117" style:parent-style-name="Policepardéfaut" style:family="text">
      <style:text-properties fo:font-weight="bold" style:font-weight-asian="bold" style:font-weight-complex="bold"/>
    </style:style>
    <style:style style:name="T118" style:parent-style-name="Policepardéfaut" style:family="text">
      <style:text-properties fo:font-weight="bold" style:font-weight-asian="bold" style:font-weight-complex="bold"/>
    </style:style>
    <style:style style:name="T119" style:parent-style-name="Policepardéfaut" style:family="text">
      <style:text-properties fo:font-weight="bold" style:font-weight-asian="bold" style:font-weight-complex="bold"/>
    </style:style>
    <style:style style:name="T120" style:parent-style-name="Policepardéfaut" style:family="text">
      <style:text-properties fo:font-weight="bold" style:font-weight-asian="bold" style:font-weight-complex="bold"/>
    </style:style>
    <style:style style:name="P121" style:parent-style-name="Titre2" style:family="paragraph">
      <style:text-properties style:use-window-font-color="true" style:text-underline-type="single" style:text-underline-style="solid" style:text-underline-width="auto" style:text-underline-mode="continuous"/>
    </style:style>
    <style:style style:name="P122" style:parent-style-name="Normal" style:family="paragraph">
      <style:text-properties fo:font-weight="bold" style:font-weight-asian="bold" style:font-weight-complex="bold" fo:font-size="14pt" style:font-size-asian="14pt" style:font-size-complex="14pt"/>
    </style:style>
    <style:style style:name="P123" style:parent-style-name="Normal" style:family="paragraph">
      <style:text-properties fo:font-weight="bold" style:font-weight-asian="bold" style:font-weight-complex="bold"/>
    </style:style>
    <style:style style:name="P124" style:parent-style-name="Normal" style:list-style-name="LFO15" style:family="paragraph"/>
    <style:style style:name="T125" style:parent-style-name="Policepardéfaut" style:family="text">
      <style:text-properties fo:font-weight="bold" style:font-weight-asian="bold" style:font-weight-complex="bold"/>
    </style:style>
    <style:style style:name="P126" style:parent-style-name="Normal" style:list-style-name="LFO15" style:family="paragraph"/>
    <style:style style:name="T127" style:parent-style-name="Policepardéfaut" style:family="text">
      <style:text-properties fo:font-weight="bold" style:font-weight-asian="bold" style:font-weight-complex="bold"/>
    </style:style>
    <style:style style:name="P128" style:parent-style-name="Normal" style:list-style-name="LFO15" style:family="paragraph"/>
    <style:style style:name="T129" style:parent-style-name="Policepardéfaut" style:family="text">
      <style:text-properties fo:font-weight="bold" style:font-weight-asian="bold" style:font-weight-complex="bold"/>
    </style:style>
    <style:style style:name="P130" style:parent-style-name="Normal" style:list-style-name="LFO15" style:family="paragraph"/>
    <style:style style:name="T131" style:parent-style-name="Policepardéfaut" style:family="text">
      <style:text-properties fo:font-weight="bold" style:font-weight-asian="bold" style:font-weight-complex="bold"/>
    </style:style>
    <style:style style:name="P132" style:parent-style-name="Normal" style:list-style-name="LFO15" style:family="paragraph"/>
    <style:style style:name="T133" style:parent-style-name="Policepardéfaut" style:family="text">
      <style:text-properties fo:font-weight="bold" style:font-weight-asian="bold" style:font-weight-complex="bold"/>
    </style:style>
    <style:style style:name="P134" style:parent-style-name="Normal" style:family="paragraph">
      <style:text-properties fo:font-weight="bold" style:font-weight-asian="bold" style:font-weight-complex="bold"/>
    </style:style>
    <style:style style:name="P135" style:parent-style-name="Normal" style:list-style-name="LFO16" style:family="paragraph"/>
    <style:style style:name="P136" style:parent-style-name="Normal" style:list-style-name="LFO16" style:family="paragraph"/>
    <style:style style:name="P137" style:parent-style-name="Titre2" style:family="paragraph">
      <style:text-properties style:use-window-font-color="true" style:text-underline-type="single" style:text-underline-style="solid" style:text-underline-width="auto" style:text-underline-mode="continuous"/>
    </style:style>
    <style:style style:name="P138" style:parent-style-name="Normal" style:family="paragraph">
      <style:text-properties fo:font-weight="bold" style:font-weight-asian="bold" style:font-weight-complex="bold" fo:font-size="14pt" style:font-size-asian="14pt" style:font-size-complex="14pt"/>
    </style:style>
    <style:style style:name="P139" style:parent-style-name="Normal" style:family="paragraph">
      <style:text-properties fo:font-weight="bold" style:font-weight-asian="bold" style:font-weight-complex="bold"/>
    </style:style>
    <style:style style:name="T140" style:parent-style-name="Policepardéfaut" style:family="text">
      <style:text-properties style:font-name="Segoe UI Symbol" style:font-name-complex="Segoe UI Symbol" fo:font-weight="bold" style:font-weight-asian="bold" style:font-weight-complex="bold"/>
    </style:style>
    <style:style style:name="T141" style:parent-style-name="Policepardéfaut" style:family="text">
      <style:text-properties fo:font-weight="bold" style:font-weight-asian="bold" style:font-weight-complex="bold"/>
    </style:style>
    <style:style style:name="P142" style:parent-style-name="Normal" style:list-style-name="LFO17" style:family="paragraph"/>
    <style:style style:name="P143" style:parent-style-name="Normal" style:list-style-name="LFO17" style:family="paragraph"/>
    <style:style style:name="P144" style:parent-style-name="Normal" style:list-style-name="LFO17" style:family="paragraph"/>
    <style:style style:name="P145" style:parent-style-name="Normal" style:list-style-name="LFO17" style:family="paragraph"/>
    <style:style style:name="P146" style:parent-style-name="Normal" style:list-style-name="LFO17" style:family="paragraph"/>
    <style:style style:name="T147" style:parent-style-name="Policepardéfaut" style:family="text">
      <style:text-properties style:font-name="Segoe UI Symbol" style:font-name-complex="Segoe UI Symbol" fo:font-weight="bold" style:font-weight-asian="bold" style:font-weight-complex="bold"/>
    </style:style>
    <style:style style:name="T148" style:parent-style-name="Policepardéfaut" style:family="text">
      <style:text-properties fo:font-weight="bold" style:font-weight-asian="bold" style:font-weight-complex="bold"/>
    </style:style>
    <style:style style:name="P149" style:parent-style-name="Normal" style:list-style-name="LFO18" style:family="paragraph"/>
    <style:style style:name="T150" style:parent-style-name="Policepardéfaut" style:family="text">
      <style:text-properties fo:font-weight="bold" style:font-weight-asian="bold" style:font-weight-complex="bold"/>
    </style:style>
    <style:style style:name="P151" style:parent-style-name="Normal" style:list-style-name="LFO18" style:family="paragraph"/>
    <style:style style:name="T152" style:parent-style-name="Policepardéfaut" style:family="text">
      <style:text-properties fo:font-weight="bold" style:font-weight-asian="bold" style:font-weight-complex="bold"/>
    </style:style>
    <style:style style:name="P153" style:parent-style-name="Normal" style:list-style-name="LFO18" style:family="paragraph"/>
    <style:style style:name="T154" style:parent-style-name="Policepardéfaut" style:family="text">
      <style:text-properties style:font-name="Segoe UI Symbol" style:font-name-complex="Segoe UI Symbol" fo:font-weight="bold" style:font-weight-asian="bold" style:font-weight-complex="bold"/>
    </style:style>
    <style:style style:name="T155" style:parent-style-name="Policepardéfaut" style:family="text">
      <style:text-properties fo:font-weight="bold" style:font-weight-asian="bold" style:font-weight-complex="bold"/>
    </style:style>
    <style:style style:name="P156" style:parent-style-name="Normal" style:list-style-name="LFO19" style:family="paragraph"/>
    <style:style style:name="T157" style:parent-style-name="Policepardéfaut" style:family="text">
      <style:text-properties fo:font-weight="bold" style:font-weight-asian="bold" style:font-weight-complex="bold"/>
    </style:style>
    <style:style style:name="P158" style:parent-style-name="Normal" style:list-style-name="LFO19" style:family="paragraph"/>
    <style:style style:name="T159" style:parent-style-name="Policepardéfaut" style:family="text">
      <style:text-properties fo:font-weight="bold" style:font-weight-asian="bold" style:font-weight-complex="bold"/>
    </style:style>
    <style:style style:name="P160" style:parent-style-name="Normal" style:list-style-name="LFO19" style:family="paragraph"/>
    <style:style style:name="T161" style:parent-style-name="Policepardéfaut" style:family="text">
      <style:text-properties fo:font-weight="bold" style:font-weight-asian="bold" style:font-weight-complex="bold"/>
    </style:style>
    <style:style style:name="T162" style:parent-style-name="Policepardéfaut" style:family="text">
      <style:text-properties style:font-name="Segoe UI Symbol" style:font-name-complex="Segoe UI Symbol" fo:font-weight="bold" style:font-weight-asian="bold" style:font-weight-complex="bold"/>
    </style:style>
    <style:style style:name="T163" style:parent-style-name="Policepardéfaut" style:family="text">
      <style:text-properties fo:font-weight="bold" style:font-weight-asian="bold" style:font-weight-complex="bold"/>
    </style:style>
    <style:style style:name="P164" style:parent-style-name="Normal" style:list-style-name="LFO20" style:family="paragraph"/>
    <style:style style:name="P165" style:parent-style-name="Normal" style:list-style-name="LFO20" style:family="paragraph"/>
    <style:style style:name="P166" style:parent-style-name="Normal" style:list-style-name="LFO20" style:family="paragraph"/>
    <style:style style:name="P167" style:parent-style-name="Titre2" style:family="paragraph">
      <style:text-properties style:use-window-font-color="true" style:text-underline-type="single" style:text-underline-style="solid" style:text-underline-width="auto" style:text-underline-mode="continuous"/>
    </style:style>
    <style:style style:name="T168" style:parent-style-name="Policepardéfaut" style:family="text">
      <style:text-properties fo:font-weight="bold" style:font-weight-asian="bold" style:font-weight-complex="bold"/>
    </style:style>
    <style:style style:name="P169" style:parent-style-name="Normal" style:list-style-name="LFO21" style:family="paragraph"/>
    <style:style style:name="P170" style:parent-style-name="Normal" style:list-style-name="LFO21" style:family="paragraph"/>
    <style:style style:name="P171" style:parent-style-name="Normal" style:list-style-name="LFO21" style:family="paragraph"/>
    <style:style style:name="P172" style:parent-style-name="Titre1" style:list-style-name="LFO3" style:family="paragraph">
      <style:text-properties style:text-underline-type="single" style:text-underline-style="solid" style:text-underline-width="auto" style:text-underline-mode="continuous"/>
    </style:style>
    <style:style style:name="P173" style:parent-style-name="Titre2" style:family="paragraph">
      <style:text-properties style:use-window-font-color="true" style:text-underline-type="single" style:text-underline-style="solid" style:text-underline-width="auto" style:text-underline-mode="continuous"/>
    </style:style>
    <style:style style:name="P174" style:parent-style-name="Normal" style:family="paragraph">
      <style:text-properties fo:font-weight="bold" style:font-weight-asian="bold" style:font-weight-complex="bold" fo:font-size="14pt" style:font-size-asian="14pt" style:font-size-complex="14pt"/>
    </style:style>
    <style:style style:name="P175" style:parent-style-name="Normal" style:list-style-name="LFO22" style:family="paragraph"/>
    <style:style style:name="T176" style:parent-style-name="Policepardéfaut" style:family="text">
      <style:text-properties fo:font-weight="bold" style:font-weight-asian="bold" style:font-weight-complex="bold"/>
    </style:style>
    <style:style style:name="P177" style:parent-style-name="Normal" style:list-style-name="LFO22" style:family="paragraph"/>
    <style:style style:name="T178" style:parent-style-name="Policepardéfaut" style:family="text">
      <style:text-properties fo:font-weight="bold" style:font-weight-asian="bold" style:font-weight-complex="bold"/>
    </style:style>
    <style:style style:name="P179" style:parent-style-name="Normal" style:list-style-name="LFO22" style:family="paragraph"/>
    <style:style style:name="T180" style:parent-style-name="Policepardéfaut" style:family="text">
      <style:text-properties fo:font-weight="bold" style:font-weight-asian="bold" style:font-weight-complex="bold"/>
    </style:style>
    <style:style style:name="P181" style:parent-style-name="Normal" style:list-style-name="LFO22" style:family="paragraph"/>
    <style:style style:name="T182" style:parent-style-name="Policepardéfaut" style:family="text">
      <style:text-properties fo:font-weight="bold" style:font-weight-asian="bold" style:font-weight-complex="bold"/>
    </style:style>
    <style:style style:name="P183" style:parent-style-name="Titre2" style:family="paragraph">
      <style:text-properties style:text-underline-type="single" style:text-underline-style="solid" style:text-underline-width="auto" style:text-underline-mode="continuous"/>
    </style:style>
    <style:style style:name="T184" style:parent-style-name="Policepardéfaut" style:family="text">
      <style:text-properties style:font-name="Segoe UI Symbol" style:font-name-complex="Segoe UI Symbol"/>
    </style:style>
    <style:style style:name="P185" style:parent-style-name="Normal" style:list-style-name="LFO23" style:family="paragraph"/>
    <style:style style:name="P186" style:parent-style-name="Normal" style:list-style-name="LFO23" style:family="paragraph"/>
    <style:style style:name="P187" style:parent-style-name="Normal" style:list-style-name="LFO23" style:family="paragraph"/>
    <style:style style:name="P188" style:parent-style-name="Normal" style:list-style-name="LFO24" style:family="paragraph"/>
    <style:style style:name="P189" style:parent-style-name="Normal" style:list-style-name="LFO24" style:family="paragraph"/>
    <style:style style:name="P190" style:parent-style-name="Normal" style:list-style-name="LFO25" style:family="paragraph"/>
    <style:style style:name="P191" style:parent-style-name="Normal" style:list-style-name="LFO25" style:family="paragraph"/>
    <style:style style:name="P192" style:parent-style-name="Normal" style:list-style-name="LFO25" style:family="paragraph"/>
    <style:style style:name="P193" style:parent-style-name="Normal" style:list-style-name="LFO26" style:family="paragraph"/>
    <style:style style:name="P194" style:parent-style-name="Normal" style:list-style-name="LFO26" style:family="paragraph"/>
    <style:style style:name="P195" style:parent-style-name="Normal" style:list-style-name="LFO26" style:family="paragraph"/>
    <style:style style:name="P196" style:parent-style-name="Normal" style:list-style-name="LFO27" style:family="paragraph"/>
    <style:style style:name="P197" style:parent-style-name="Normal" style:list-style-name="LFO28" style:family="paragraph"/>
    <style:style style:name="P198" style:parent-style-name="Normal" style:list-style-name="LFO28" style:family="paragraph"/>
    <style:style style:name="P199" style:parent-style-name="Normal" style:list-style-name="LFO28" style:family="paragraph"/>
    <style:style style:name="P200" style:parent-style-name="Titre1" style:list-style-name="LFO3" style:family="paragraph">
      <style:text-properties style:text-underline-type="single" style:text-underline-style="solid" style:text-underline-width="auto" style:text-underline-mode="continuous"/>
    </style:style>
    <style:style style:name="T201" style:parent-style-name="Policepardéfaut" style:family="text">
      <style:text-properties style:font-name="Segoe UI Symbol" style:font-name-complex="Segoe UI Symbol" fo:font-weight="bold" style:font-weight-asian="bold" style:font-weight-complex="bold"/>
    </style:style>
    <style:style style:name="T202" style:parent-style-name="Policepardéfaut" style:family="text">
      <style:text-properties fo:font-weight="bold" style:font-weight-asian="bold" style:font-weight-complex="bold"/>
    </style:style>
    <style:style style:name="P203" style:parent-style-name="Normal" style:list-style-name="LFO29" style:family="paragraph"/>
    <style:style style:name="P204" style:parent-style-name="Normal" style:list-style-name="LFO29" style:family="paragraph"/>
    <style:style style:name="P205" style:parent-style-name="Normal" style:list-style-name="LFO29" style:family="paragraph"/>
    <style:style style:name="T206" style:parent-style-name="Policepardéfaut" style:family="text">
      <style:text-properties style:font-name="Segoe UI Symbol" style:font-name-complex="Segoe UI Symbol" fo:font-weight="bold" style:font-weight-asian="bold" style:font-weight-complex="bold"/>
    </style:style>
    <style:style style:name="T207" style:parent-style-name="Policepardéfaut" style:family="text">
      <style:text-properties fo:font-weight="bold" style:font-weight-asian="bold" style:font-weight-complex="bold"/>
    </style:style>
    <style:style style:name="P208" style:parent-style-name="Normal" style:list-style-name="LFO30" style:family="paragraph"/>
    <style:style style:name="T209" style:parent-style-name="Policepardéfaut" style:family="text">
      <style:text-properties style:font-name="Segoe UI Symbol" style:font-name-complex="Segoe UI Symbol" fo:font-weight="bold" style:font-weight-asian="bold" style:font-weight-complex="bold"/>
    </style:style>
    <style:style style:name="T210" style:parent-style-name="Policepardéfaut" style:family="text">
      <style:text-properties fo:font-weight="bold" style:font-weight-asian="bold" style:font-weight-complex="bold"/>
    </style:style>
    <style:style style:name="P211" style:parent-style-name="Normal" style:list-style-name="LFO31" style:family="paragraph"/>
    <style:style style:name="P212" style:parent-style-name="Normal" style:list-style-name="LFO31" style:family="paragraph"/>
    <style:style style:name="T213" style:parent-style-name="Policepardéfaut" style:family="text">
      <style:text-properties style:font-name="Segoe UI Symbol" style:font-name-complex="Segoe UI Symbol" fo:font-weight="bold" style:font-weight-asian="bold" style:font-weight-complex="bold"/>
    </style:style>
    <style:style style:name="T214" style:parent-style-name="Policepardéfaut" style:family="text">
      <style:text-properties fo:font-weight="bold" style:font-weight-asian="bold" style:font-weight-complex="bold"/>
    </style:style>
    <style:style style:name="P215" style:parent-style-name="Normal" style:list-style-name="LFO32" style:family="paragraph"/>
    <style:style style:name="P216" style:parent-style-name="Normal" style:list-style-name="LFO32" style:family="paragraph"/>
    <style:style style:name="P217" style:parent-style-name="Normal" style:list-style-name="LFO32" style:family="paragraph"/>
    <style:style style:name="P218" style:parent-style-name="Titre1" style:list-style-name="LFO3" style:family="paragraph">
      <style:text-properties style:text-underline-type="single" style:text-underline-style="solid" style:text-underline-width="auto" style:text-underline-mode="continuous"/>
    </style:style>
    <style:style style:name="T219" style:parent-style-name="Policepardéfaut" style:family="text">
      <style:text-properties style:font-name="Segoe UI Symbol" style:font-name-complex="Segoe UI Symbol" fo:font-weight="bold" style:font-weight-asian="bold" style:font-weight-complex="bold"/>
    </style:style>
    <style:style style:name="T220" style:parent-style-name="Policepardéfaut" style:family="text">
      <style:text-properties fo:font-weight="bold" style:font-weight-asian="bold" style:font-weight-complex="bold"/>
    </style:style>
    <style:style style:name="P221" style:parent-style-name="Normal" style:list-style-name="LFO33" style:family="paragraph"/>
    <style:style style:name="T222" style:parent-style-name="Policepardéfaut" style:family="text">
      <style:text-properties fo:font-weight="bold" style:font-weight-asian="bold" style:font-weight-complex="bold"/>
    </style:style>
    <style:style style:name="P223" style:parent-style-name="Normal" style:list-style-name="LFO33" style:family="paragraph"/>
    <style:style style:name="T224" style:parent-style-name="Policepardéfaut" style:family="text">
      <style:text-properties fo:font-weight="bold" style:font-weight-asian="bold" style:font-weight-complex="bold"/>
    </style:style>
    <style:style style:name="P225" style:parent-style-name="Normal" style:list-style-name="LFO33" style:family="paragraph"/>
    <style:style style:name="T226" style:parent-style-name="Policepardéfaut" style:family="text">
      <style:text-properties fo:font-weight="bold" style:font-weight-asian="bold" style:font-weight-complex="bold"/>
    </style:style>
    <style:style style:name="T227" style:parent-style-name="Policepardéfaut" style:family="text">
      <style:text-properties style:font-name="Segoe UI Symbol" style:font-name-complex="Segoe UI Symbol" fo:font-weight="bold" style:font-weight-asian="bold" style:font-weight-complex="bold"/>
    </style:style>
    <style:style style:name="T228" style:parent-style-name="Policepardéfaut" style:family="text">
      <style:text-properties fo:font-weight="bold" style:font-weight-asian="bold" style:font-weight-complex="bold"/>
    </style:style>
    <style:style style:name="P229" style:parent-style-name="Titre1" style:list-style-name="LFO3" style:family="paragraph">
      <style:text-properties style:text-underline-type="single" style:text-underline-style="solid" style:text-underline-width="auto" style:text-underline-mode="continuous"/>
    </style:style>
    <style:style style:name="T230" style:parent-style-name="Policepardéfaut" style:family="text">
      <style:text-properties style:font-name="Segoe UI Symbol" style:font-name-complex="Segoe UI Symbol" fo:font-weight="bold" style:font-weight-asian="bold" style:font-weight-complex="bold"/>
    </style:style>
    <style:style style:name="T231" style:parent-style-name="Policepardéfaut" style:family="text">
      <style:text-properties fo:font-weight="bold" style:font-weight-asian="bold" style:font-weight-complex="bold"/>
    </style:style>
    <style:style style:name="P232" style:parent-style-name="Paragraphedeliste" style:list-style-name="LFO33" style:family="paragraph"/>
    <style:style style:name="T233" style:parent-style-name="Policepardéfaut" style:family="text">
      <style:text-properties style:font-name="Segoe UI Symbol" style:font-name-complex="Segoe UI Symbol" fo:font-weight="bold" style:font-weight-asian="bold" style:font-weight-complex="bold"/>
    </style:style>
    <style:style style:name="T234" style:parent-style-name="Policepardéfaut" style:family="text">
      <style:text-properties fo:font-weight="bold" style:font-weight-asian="bold" style:font-weight-complex="bold"/>
    </style:style>
    <style:style style:name="P235" style:parent-style-name="Normal" style:list-style-name="LFO34" style:family="paragraph"/>
    <style:style style:name="T236" style:parent-style-name="Policepardéfaut" style:family="text">
      <style:text-properties fo:font-weight="bold" style:font-weight-asian="bold" style:font-weight-complex="bold"/>
    </style:style>
    <style:style style:name="P237" style:parent-style-name="Normal" style:list-style-name="LFO34" style:family="paragraph"/>
    <style:style style:name="P238" style:parent-style-name="Normal" style:list-style-name="LFO34" style:family="paragraph"/>
    <style:style style:name="P239" style:parent-style-name="Paragraphedeliste" style:list-style-name="LFO34" style:family="paragraph"/>
  </office:automatic-styles>
  <office:body>
    <office:text text:use-soft-page-breaks="true">
      <text:p text:style-name="P1">TP Veille stratégique</text:p>
      <text:p text:style-name="Normal"/>
      <text:p text:style-name="Normal"/>
      <text:p text:style-name="Normal">La veille (stratégique ou informationnelle) consiste à collecter des informations stratégiques pour permettre d’anticiper les évolutions et les innovations.<text:line-break/>Il s’agit de se tenir au courant des informations pertinentes sur un thème précis.<text:line-break/>Alors que la recherche d’informations est ponctuelle et dépend d’un besoin immédiat, la veille est une activité continue sur une longue durée et prévue à l’avance.<text:line-break/><text:line-break/><text:span text:style-name="T2">Caractéristiques générales des veilles :</text:span></text:p>
      <text:list text:style-name="LFO1" text:continue-numbering="true">
        <text:list-item>
          <text:p text:style-name="P3">Finalité (opérationnelle / stratégique, scientifique / technique, recherche / développement)<text:s/></text:p>
        </text:list-item>
        <text:list-item>
          <text:p text:style-name="P4">Nombre et qualité des destinataires</text:p>
        </text:list-item>
        <text:list-item>
          <text:p text:style-name="P5">Etendue, nature, et diversité des sources</text:p>
        </text:list-item>
        <text:list-item>
          <text:p text:style-name="P6">Niveau de valeur ajoutée</text:p>
        </text:list-item>
        <text:list-item>
          <text:p text:style-name="P7">Mise à disposition, présentation</text:p>
        </text:list-item>
      </text:list>
      <text:p text:style-name="Normal"/>
      <text:p text:style-name="Normal"><text:span text:style-name="T8">Sources</text:span> :<text:s/></text:p>
      <text:p text:style-name="Normal"/>
      <text:p text:style-name="Normal">Informations orale ou écrite, réelle ou modélisée, imagerie<text:s/></text:p>
      <text:p text:style-name="Normal">Humint : intelligence humaine</text:p>
      <text:p text:style-name="Normal">Osint : Intelligence sources ouvertes</text:p>
      <text:p text:style-name="Normal"/>
      <text:p text:style-name="P9">Le veilleur :</text:p>
      <text:p text:style-name="Normal"/>
      <text:p text:style-name="Normal">Il doit décrypter les signaux faibles, les stratégies d’influence.</text:p>
      <text:p text:style-name="Normal">Il doit identifier les diversions et les désinformations.</text:p>
      <text:p text:style-name="Normal"/>
      <text:p text:style-name="P10">Diffusion :</text:p>
      <text:p text:style-name="Normal"/>
      <text:p text:style-name="Normal">Rédaction des notes, newsletter</text:p>
      <text:soft-page-break/>
      <text:p text:style-name="P11">Liste de diffusion</text:p>
      <text:p text:style-name="Normal">Attention aux freins : problèmes de communication dans l’entreprise, rétention d’information, contexte politique</text:p>
      <text:p text:style-name="Normal"/>
      <text:h text:style-name="P12" text:outline-level="2">Outils :</text:h>
      <text:p text:style-name="Normal"/>
      <text:p text:style-name="Normal"><text:span text:style-name="T13">-Méthode Pull </text:span>: le veilleur cherche des informations. Efficace Chronophage.</text:p>
      <text:p text:style-name="Normal"/>
      <text:p text:style-name="Normal"><text:span text:style-name="T14">-Méthode Push</text:span> : l’information arrive au veilleur par des flux RSS, alertes Google… Automatisation, gain de temps, mais il faut bien cerner la recherche.</text:p>
      <text:p text:style-name="Normal"/>
      <text:p text:style-name="P15">Degré d’accessibilité :</text:p>
      <text:p text:style-name="Normal">Information :</text:p>
      <text:list text:style-name="LFO1" text:continue-numbering="true">
        <text:list-item>
          <text:p text:style-name="P16">Blanche (moteurs de recherche classiques)</text:p>
        </text:list-item>
        <text:list-item>
          <text:p text:style-name="P17">Grise (techniques plus avancées)</text:p>
        </text:list-item>
        <text:list-item>
          <text:p text:style-name="P18">Noire (Espionnage industriel)</text:p>
        </text:list-item>
      </text:list>
      <text:p text:style-name="Normal"/>
      <text:h text:style-name="P19" text:outline-level="2">Etapes :</text:h>
      <text:list text:style-name="LFO2" text:continue-numbering="true">
        <text:list-item>
          <text:p text:style-name="P20">Définir les besoins</text:p>
        </text:list-item>
      </text:list>
      <text:p text:style-name="Paragraphedeliste">Auxiliaires de recherches, cibles, planifications, délais, coûts</text:p>
      <text:list text:style-name="LFO2" text:continue-numbering="true">
        <text:list-item>
          <text:p text:style-name="P21">Collecter les informations</text:p>
        </text:list-item>
      </text:list>
      <text:p text:style-name="Paragraphedeliste">Choix des sources, internes et externes, gratuits et payantes</text:p>
      <text:list text:style-name="LFO2" text:continue-numbering="true">
        <text:list-item>
          <text:p text:style-name="P22">Regrouper les informations<text:s/></text:p>
        </text:list-item>
      </text:list>
      <text:p text:style-name="Paragraphedeliste">On différencie les informations formelles (internet, presse) et informelles (salons, rencontres).</text:p>
      <text:list text:style-name="LFO2" text:continue-numbering="true">
        <text:list-item>
          <text:p text:style-name="P23">Analyser les informations</text:p>
        </text:list-item>
        <text:list-item>
          <text:p text:style-name="P24">Diffuser l’information</text:p>
        </text:list-item>
        <text:list-item>
          <text:p text:style-name="P25">Sauvegarder les résultats</text:p>
        </text:list-item>
      </text:list>
      <text:p text:style-name="Normal"/>
      <text:p text:style-name="P26">Veille réputationnelle :</text:p>
      <text:p text:style-name="Normal">On recherche l’e-réputation de l’entreprise.</text:p>
      <text:p text:style-name="Normal"/>
      <text:soft-page-break/>
      <text:list text:style-name="LFO3" text:continue-numbering="true">
        <text:list-item>
          <text:p text:style-name="P27">Définir les besoins</text:p>
        </text:list-item>
      </text:list>
      <text:p text:style-name="Normal"/>
      <text:h text:style-name="P28" text:outline-level="2">1.1 Objectifs de la veille pour Konvergence 38</text:h>
      <text:p text:style-name="Normal">Konvergence 38 est une entreprise spécialisée dans les services numériques : infogérance, réseaux, maintenance informatique, cybersécurité, solutions cloud, sauvegarde, la protection des données, et accompagnement des professionnels.<text:line-break/>Dans ce contexte, la veille stratégique doit répondre à plusieurs objectifs :</text:p>
      <text:p text:style-name="Normal"/>
      <text:p text:style-name="P29">Objectifs techniques :</text:p>
      <text:list text:style-name="LFO4" text:continue-numbering="true">
        <text:list-item>
          <text:p text:style-name="P30">Suivre l’évolution des<text:s/><text:span text:style-name="T31">technologies (réseau)</text:span><text:s/>(switching, routage, Wi-Fi pro, fibre) = cycles d’infogérance très courts.</text:p>
        </text:list-item>
        <text:list-item>
          <text:p text:style-name="P32">Anticiper les nouveautés en<text:s/><text:span text:style-name="T33">cybersécurité</text:span><text:s/>(vulnérabilités, attaques émergentes, solutions de défense).</text:p>
        </text:list-item>
        <text:list-item>
          <text:p text:style-name="P34">Surveiller les innovations dans les<text:s/><text:span text:style-name="T35">solutions cloud</text:span><text:s/>(Microsoft 365, Azure, sauvegardes en ligne)<text:s/>= avantage concurrentiel.</text:p>
        </text:list-item>
        <text:list-item>
          <text:p text:style-name="P36">Identifier les nouvelles tendances en<text:s/><text:span text:style-name="T37">outils de gestion informatique</text:span><text:s/>( supervision, automatisation).</text:p>
        </text:list-item>
      </text:list>
      <text:p text:style-name="P38">Objectifs commerciaux :</text:p>
      <text:list text:style-name="LFO5" text:continue-numbering="true">
        <text:list-item>
          <text:p text:style-name="P39">Analyser le positionnement des<text:s/><text:span text:style-name="T40">concurrents locaux</text:span><text:s/>(Tarifs, services proposés, innovations).</text:p>
        </text:list-item>
        <text:list-item>
          <text:p text:style-name="P41">Détecter de nouveaux<text:s/><text:span text:style-name="T42">segments de clientèle</text:span><text:s/>(PME, collectivités, artisans).</text:p>
        </text:list-item>
        <text:list-item>
          <text:p text:style-name="P43">Repérer les<text:s/><text:span text:style-name="T44">besoins récurrents</text:span><text:s/>des entreprises de la région.</text:p>
        </text:list-item>
        <text:list-item>
          <text:p text:style-name="P45">Explorer de possibles<text:s/><text:span text:style-name="T46">partenariats</text:span><text:s/>(éditeurs, constructeurs, distributeurs).</text:p>
        </text:list-item>
      </text:list>
      <text:p text:style-name="P47">Objectifs stratégiques :</text:p>
      <text:list text:style-name="LFO6" text:continue-numbering="true">
        <text:list-item>
          <text:p text:style-name="P48">Anticiper les risques liés aux évolutions réglementaires (RGPD).</text:p>
        </text:list-item>
        <text:list-item>
          <text:p text:style-name="P49">Évaluer les menaces sectorielles (cyberattaques, concurrence, rupture technologique).</text:p>
        </text:list-item>
        <text:list-item>
          <text:p text:style-name="P50">Identifier les opportunités de développement (nouveaux services, certifications).</text:p>
        </text:list-item>
      </text:list>
      <text:p text:style-name="Normal"/>
      <text:p text:style-name="P51"/>
      <text:soft-page-break/>
      <text:h text:style-name="P52" text:outline-level="2">1.2 Auxiliaires de recherche</text:h>
      <text:p text:style-name="P53">Pour mener une veille efficace, plusieurs outils et mots-clés sont définis à l’avance.</text:p>
      <text:p text:style-name="P54">Outils de recherche utilisés :</text:p>
      <text:p text:style-name="P55"/>
      <text:list text:style-name="LFO7" text:continue-numbering="true">
        <text:list-item>
          <text:p text:style-name="P56"><text:span text:style-name="T57">Google Alerts</text:span><text:s/>: alertes automatiques sur les termes “cybersécurité PME”, “Konvergence informatique”, “tendances IT 2025”, etc.</text:p>
        </text:list-item>
        <text:list-item>
          <text:p text:style-name="P58"><text:span text:style-name="T59">RSS</text:span><text:s/>: flux de blogs et médias spécialisés.</text:p>
        </text:list-item>
        <text:list-item>
          <text:p text:style-name="P60"><text:span text:style-name="T61">LinkedIn</text:span><text:s/>: réseaux professionnels, annonces de concurrents.</text:p>
        </text:list-item>
        <text:list-item>
          <text:p text:style-name="P62"><text:span text:style-name="T63">Sites spécialisés</text:span><text:s/>: ANSSI, ZDNet, Le Monde Informatique, CERT-FR.</text:p>
        </text:list-item>
        <text:list-item>
          <text:p text:style-name="P64"><text:span text:style-name="T65">Comparateurs</text:span><text:s/>: pour analyser les prix d’infogérance ou d’abonnements cloud.</text:p>
        </text:list-item>
      </text:list>
      <text:p text:style-name="P66"/>
      <text:p text:style-name="P67"/>
      <text:p text:style-name="P68"/>
      <text:h text:style-name="P69" text:outline-level="2">1.3 Cibles surveillées</text:h>
      <text:p text:style-name="P70"/>
      <text:p text:style-name="P71">La veille stratégique se concentre sur plusieurs cibles importantes :</text:p>
      <text:p text:style-name="P72">Concurrents :</text:p>
      <text:list text:style-name="LFO8" text:continue-numbering="true">
        <text:list-item>
          <text:p text:style-name="P73">ESN locales / prestataires informatiques dans le bassin grenoblois<text:s/>/ Moirans.</text:p>
        </text:list-item>
        <text:list-item>
          <text:p text:style-name="P74">Micro-entreprises spécialisées en dépannage informatique.</text:p>
        </text:list-item>
        <text:list-item>
          <text:p text:style-name="P75">Grands acteurs qui proposent des offres pour PME (Orange Business, SFR Pro, etc.).</text:p>
        </text:list-item>
      </text:list>
      <text:p text:style-name="P76">Partenaires ou fournisseurs :</text:p>
      <text:list text:style-name="LFO9" text:continue-numbering="true">
        <text:list-item>
          <text:p text:style-name="P77">Éditeurs de logiciels : Microsoft, Acronis, ESET.</text:p>
        </text:list-item>
        <text:list-item>
          <text:p text:style-name="P78">Constructeurs : Dell, HP, Cisco, Iiyama.</text:p>
        </text:list-item>
      </text:list>
      <text:p text:style-name="P79">Clientèle visée :</text:p>
      <text:list text:style-name="LFO10" text:continue-numbering="true">
        <text:list-item>
          <text:p text:style-name="P80">PME et TPE de la région (industrie, commerce, services).</text:p>
        </text:list-item>
        <text:list-item>
          <text:p text:style-name="P81">Professions libérales (médecins, avocats, experts-comptables).</text:p>
        </text:list-item>
        <text:list-item>
          <text:p text:style-name="P82">Collectivités locales ou établissements scolaires.</text:p>
        </text:list-item>
      </text:list>
      <text:soft-page-break/>
      <text:h text:style-name="P83" text:outline-level="2">1.5 Délais</text:h>
      <text:p text:style-name="P84"/>
      <text:p text:style-name="P85">Les délais sont fixés selon le rythme d’activité de l’entreprise et selon les tâches à effectuer. C’est très variable.</text:p>
      <text:list text:style-name="LFO11" text:continue-numbering="true">
        <text:list-item>
          <text:p text:style-name="P86">Temps de consultation des sauvegardes chaque semaines :<text:s/><text:span text:style-name="T87">1 h à 1 h 30</text:span>.</text:p>
        </text:list-item>
        <text:list-item>
          <text:p text:style-name="P88">Temps passé à faire des checkups des mails :<text:s/><text:span text:style-name="T89">Toute la journée je vérifie les arrivées</text:span></text:p>
        </text:list-item>
        <text:list-item>
          <text:p text:style-name="P90">Rapport mensuel ou trimestriel :<text:s/><text:span text:style-name="T91">1 h</text:span>.</text:p>
        </text:list-item>
      </text:list>
      <text:p text:style-name="Normal"/>
      <text:p text:style-name="Normal"/>
      <text:h text:style-name="P92" text:outline-level="2">1.6 Coûts</text:h>
      <text:p text:style-name="P93"/>
      <text:p text:style-name="Normal">Konvergence 38 privilégie des outils<text:s/><text:span text:style-name="T94">gratuits</text:span>, ce qui réduit les dépenses.</text:p>
      <text:p text:style-name="P95">Coûts directs :</text:p>
      <text:list text:style-name="LFO12" text:continue-numbering="true">
        <text:list-item>
          <text:p text:style-name="P96">Outils de veille gratuits →<text:s/><text:span text:style-name="T97">0 €</text:span></text:p>
          <text:list text:continue-numbering="true">
            <text:list-item>
              <text:list>
                <text:list-item>
                  <text:p text:style-name="P98">Toutes les nouvelles avancées technologiques, les promotions sur les sites fournisseur….</text:p>
                </text:list-item>
              </text:list>
            </text:list-item>
          </text:list>
        </text:list-item>
        <text:list-item>
          <text:p text:style-name="P99">Outils payants optionnels (non obligatoires) :</text:p>
          <text:list text:continue-numbering="true">
            <text:list-item>
              <text:p text:style-name="P100">Services premium type Kompass, Owler, Meltwater →<text:s/><text:span text:style-name="T101">50 à 200 €/mois</text:span><text:s/>selon besoins.</text:p>
            </text:list-item>
          </text:list>
        </text:list-item>
      </text:list>
      <text:p text:style-name="P102">Coûts indirects :</text:p>
      <text:list text:style-name="LFO13" text:continue-numbering="true">
        <text:list-item>
          <text:p text:style-name="P103">Temps passé par le technicien<text:s/>:<text:line-break/>→ environ<text:s/><text:span text:style-name="T104">5 h par mois</text:span><text:s/>dédiées à la veille.</text:p>
        </text:list-item>
      </text:list>
      <text:p text:style-name="Normal">Ainsi, le coût global reste<text:s/><text:span text:style-name="T105">faible</text:span>, ce qui rend la veille accessible même pour une PME</text:p>
      <text:p text:style-name="Normal"/>
      <text:p text:style-name="Normal"/>
      <text:p text:style-name="Normal"/>
      <text:p text:style-name="Normal"/>
      <text:p text:style-name="Normal"/>
      <text:soft-page-break/>
      <text:list text:style-name="LFO3" text:continue-numbering="true">
        <text:list-item>
          <text:p text:style-name="P106">Collecter les informations, choix des sources, internes et externes, gratuits et payantes</text:p>
        </text:list-item>
      </text:list>
      <text:p text:style-name="Normal"/>
      <text:p text:style-name="Normal"/>
      <text:h text:style-name="P107" text:outline-level="2">2.1 Choix des sources d'information</text:h>
      <text:p text:style-name="P108"/>
      <text:p text:style-name="Normal">Pour obtenir une veille complète et fiable, il est nécessaire d’utiliser plusieurs sources, chacune apportant un type d’information différent :</text:p>
      <text:p text:style-name="P109">Types de sources utilisées :</text:p>
      <text:list text:style-name="LFO14" text:continue-numbering="true">
        <text:list-item>
          <text:p text:style-name="P110"><text:span text:style-name="T111">Sources documentaires</text:span><text:s/>: articles, rapports, études de marché.</text:p>
        </text:list-item>
        <text:list-item>
          <text:p text:style-name="P112"><text:span text:style-name="T113">Sources numériques</text:span><text:s/>: sites web spécialisés, blogs, réseaux sociaux professionnels.</text:p>
        </text:list-item>
        <text:list-item>
          <text:p text:style-name="P114"><text:span text:style-name="T115">Sources institutionnelles</text:span><text:s/>: ANSSI, CNIL, CERT-FR.</text:p>
        </text:list-item>
        <text:list-item>
          <text:p text:style-name="P116"><text:span text:style-name="T117">Sources terrain</text:span><text:s/>: retours clients, rencontres professionnelles, fournisseurs.</text:p>
        </text:list-item>
      </text:list>
      <text:p text:style-name="Normal">Chaque source est sélectionnée selon sa<text:s/><text:span text:style-name="T118">fiabilité</text:span>, son<text:s/><text:span text:style-name="T119">actualisation</text:span><text:s/>et sa<text:s/><text:span text:style-name="T120">pertinence</text:span><text:s/>pour l’activité.</text:p>
      <text:p text:style-name="Normal"/>
      <text:p text:style-name="Normal"/>
      <text:h text:style-name="P121" text:outline-level="2">2.2 Sources internes</text:h>
      <text:p text:style-name="P122"/>
      <text:p text:style-name="Normal">Les informations internes proviennent directement de l’entreprise et sont souvent très précieuses car elles reflètent la réalité du terrain.</text:p>
      <text:p text:style-name="P123">Exemples de sources internes :</text:p>
      <text:list text:style-name="LFO15" text:continue-numbering="true">
        <text:list-item>
          <text:p text:style-name="P124"><text:span text:style-name="T125">Fiches d’intervention</text:span><text:s/>: problèmes récurrents rencontrés chez les clients (Nous avons mit en place un GLPI qui est hébergé sur le serveur en local et non accessible en extérieur et mon travail c’est de mettre à jour les tickets à chaque problème SAV en plus du fait que j’ai un fichier Word sur lequel je mets les solutions à certains problèmes récurrents)</text:p>
        </text:list-item>
        <text:list-item>
          <text:p text:style-name="P126"><text:span text:style-name="T127">Base de connaissances interne</text:span><text:s/>: procédures (Fichier de 80pages), incidents techniques, FAQ interne (GLPI).</text:p>
        </text:list-item>
        <text:list-item>
          <text:p text:style-name="P128"><text:span text:style-name="T129">Rapports commerciaux</text:span><text:s/>: demandes fréquentes, retours clients, tarifs pratiqués.</text:p>
        </text:list-item>
        <text:list-item>
          <text:p text:style-name="P130"><text:span text:style-name="T131">Réunions internes</text:span><text:s/>: informations échangées entre techniciens et commerciaux.</text:p>
        </text:list-item>
        <text:list-item>
          <text:p text:style-name="P132"><text:span text:style-name="T133">Historique des projets</text:span><text:s/>: migration cloud, installation réseau, audits de sécurité.</text:p>
        </text:list-item>
      </text:list>
      <text:p text:style-name="P134">Intérêt des sources internes :</text:p>
      <text:list text:style-name="LFO16" text:continue-numbering="true">
        <text:list-item>
          <text:p text:style-name="P135">Informations concrètes, basées sur l’activité réelle.</text:p>
        </text:list-item>
        <text:list-item>
          <text:p text:style-name="P136">Permettent d’identifier les tendances locales spécifiques (types de pannes, besoins clients).</text:p>
        </text:list-item>
      </text:list>
      <text:p text:style-name="Normal"/>
      <text:p text:style-name="Normal"/>
      <text:h text:style-name="P137" text:outline-level="2">2.3 Sources externes gratuites</text:h>
      <text:p text:style-name="P138"/>
      <text:p text:style-name="Normal">Ce sont les sources principalement utilisées pour la veille, car elles sont nombreuses, accessibles et régulièrement mises à jour.</text:p>
      <text:p text:style-name="P139">Sources gratuites pertinentes pour Konvergence 38 :</text:p>
      <text:p text:style-name="Normal"><text:span text:style-name="T140">✔</text:span><text:span text:style-name="T141"><text:s/>Sites spécialisés en informatique :</text:span></text:p>
      <text:list text:style-name="LFO17" text:continue-numbering="true">
        <text:list-item>
          <text:p text:style-name="P142">Le Monde Informatique</text:p>
        </text:list-item>
        <text:list-item>
          <text:p text:style-name="P143">ZDNet</text:p>
        </text:list-item>
        <text:list-item>
          <text:p text:style-name="P144">01Net Pro</text:p>
        </text:list-item>
        <text:list-item>
          <text:p text:style-name="P145">Developpez.com</text:p>
        </text:list-item>
        <text:list-item>
          <text:p text:style-name="P146">TechRadar Pro</text:p>
        </text:list-item>
      </text:list>
      <text:p text:style-name="Normal"><text:span text:style-name="T147">✔</text:span><text:span text:style-name="T148"><text:s/>Cybersécurité :</text:span></text:p>
      <text:list text:style-name="LFO18" text:continue-numbering="true">
        <text:list-item>
          <text:p text:style-name="P149"><text:span text:style-name="T150">ANSSI</text:span><text:s/>(alertes, guides, bulletins)</text:p>
        </text:list-item>
        <text:list-item>
          <text:p text:style-name="P151"><text:span text:style-name="T152">CERT-FR</text:span><text:s/>(vulnérabilités, menaces émergentes)</text:p>
        </text:list-item>
        <text:list-item>
          <text:p text:style-name="P153">Blogs d'éditeurs de sécurité (ESET, Stormshield, Sophos)</text:p>
        </text:list-item>
      </text:list>
      <text:p text:style-name="Normal"><text:span text:style-name="T154">✔</text:span><text:span text:style-name="T155"><text:s/>Outils de veille gratuits :</text:span></text:p>
      <text:list text:style-name="LFO19" text:continue-numbering="true">
        <text:list-item>
          <text:p text:style-name="P156"><text:span text:style-name="T157">Google Alerts</text:span><text:s/>(mots-clés : infogérance, cybersécurité PME, cloud, etc.)</text:p>
        </text:list-item>
        <text:list-item>
          <text:p text:style-name="P158"><text:span text:style-name="T159">Flux RSS</text:span><text:s/>des sites techniques</text:p>
        </text:list-item>
        <text:list-item>
          <text:p text:style-name="P160"><text:span text:style-name="T161">LinkedIn</text:span><text:s/>(publications des concurrents, tendances du secteur)</text:p>
        </text:list-item>
      </text:list>
      <text:soft-page-break/>
      <text:p text:style-name="Normal"><text:span text:style-name="T162">✔</text:span><text:span text:style-name="T163"><text:s/>Sources concurrentielles :</text:span></text:p>
      <text:list text:style-name="LFO20" text:continue-numbering="true">
        <text:list-item>
          <text:p text:style-name="P164">Sites web des prestataires informatiques de la région Grenoble / Auvergne-Rhône-Alpes</text:p>
        </text:list-item>
        <text:list-item>
          <text:p text:style-name="P165">Pages Google My Business (avis clients)</text:p>
        </text:list-item>
        <text:list-item>
          <text:p text:style-name="P166">Offres d’emploi → reflètent la stratégie des concurrents (ex : recrutement cybersécurité)</text:p>
        </text:list-item>
      </text:list>
      <text:p text:style-name="Normal"/>
      <text:p text:style-name="Normal"/>
      <text:h text:style-name="P167" text:outline-level="2">2.4 Méthode de collecte</text:h>
      <text:p text:style-name="Normal">La collecte se fait de manière<text:s/><text:span text:style-name="T168">régulière et organisée</text:span><text:s/>:</text:p>
      <text:list text:style-name="LFO21" text:continue-numbering="true">
        <text:list-item>
          <text:p text:style-name="P169">Lecture hebdomadaire de la presse technologique.</text:p>
        </text:list-item>
        <text:list-item>
          <text:p text:style-name="P170">Surveillance des réseaux professionnels (LinkedIn).</text:p>
        </text:list-item>
        <text:list-item>
          <text:p text:style-name="P171">Retours des associés (c’est Topas nos associés qui commandent certains produits sur un site fournisseur et ls stock dans leurs locaux qui est collé au notre).</text:p>
        </text:list-item>
      </text:list>
      <text:p text:style-name="Normal"/>
      <text:h text:style-name="Titre1" text:outline-level="1"/>
      <text:list text:style-name="LFO3" text:continue-numbering="true">
        <text:list-item>
          <text:p text:style-name="P172">Regrouper les informations : on différencie les informations formelles (internet, presse) et informelles (salons, rencontres).</text:p>
        </text:list-item>
      </text:list>
      <text:p text:style-name="Normal"/>
      <text:p text:style-name="Normal"/>
      <text:h text:style-name="P173" text:outline-level="2">3.1 Méthode de regroupement</text:h>
      <text:p text:style-name="P174"/>
      <text:p text:style-name="Normal">Après la collecte, les informations sont regroupées dans un fichier auquel je n’ai pas accès car je ne touche pas à cette partie.<text:line-break/>Elles sont classées selon :</text:p>
      <text:list text:style-name="LFO22" text:continue-numbering="true">
        <text:list-item>
          <text:p text:style-name="P175">Leur<text:s/><text:span text:style-name="T176">origine</text:span><text:s/>(source interne ou externe)</text:p>
        </text:list-item>
        <text:list-item>
          <text:p text:style-name="P177">Leur<text:s/><text:span text:style-name="T178">type</text:span><text:s/>(formelle ou informelle)</text:p>
        </text:list-item>
        <text:list-item>
          <text:p text:style-name="P179">Leur<text:s/><text:span text:style-name="T180">thématique</text:span><text:s/>(cybersécurité, réseau, cloud, concurrence, marché, etc.)</text:p>
        </text:list-item>
        <text:list-item>
          <text:p text:style-name="P181">Leur<text:s/><text:span text:style-name="T182">degré d’importance</text:span><text:s/>pour l’entreprise</text:p>
        </text:list-item>
      </text:list>
      <text:p text:style-name="Normal">Cette étape facilite la transformation des données brutes en informations exploitables.</text:p>
      <text:p text:style-name="Normal"/>
      <text:p text:style-name="Normal"/>
      <text:p text:style-name="Normal"/>
      <text:h text:style-name="P183" text:outline-level="2">3.2 Informations informelles (spécifiques au terrain de Konvergence 38)</text:h>
      <text:p text:style-name="Normal"/>
      <text:p text:style-name="Normal">Les informations informelles viennent principalement des retours clients, les échanges avec nos associés et des tests effectués.</text:p>
      <text:p text:style-name="Normal"><text:span text:style-name="T184">K</text:span>onvergence 38 :</text:p>
      <text:p text:style-name="Normal">– Retours des clients (rencontres, dépannages, appels) :</text:p>
      <text:list text:style-name="LFO23" text:continue-numbering="true">
        <text:list-item>
          <text:p text:style-name="P185">Certains clients ont déjà signalé des attaques par phishing → besoin d’une formation ou d’un filtre mail renforcé.</text:p>
        </text:list-item>
        <text:list-item>
          <text:p text:style-name="P186">Demande fréquente de migration vers Microsoft 365 → Solution de plus en plus demandée et nécessaire.</text:p>
        </text:list-item>
        <text:list-item>
          <text:p text:style-name="P187">Difficultés récurrentes avec des box opérateurs → opportunité de proposer des solutions réseau pro (plus cher mais généralement plus performant).</text:p>
        </text:list-item>
      </text:list>
      <text:p text:style-name="Normal">– Échanges lors d’interventions :</text:p>
      <text:list text:style-name="LFO24" text:continue-numbering="true">
        <text:list-item>
          <text:p text:style-name="P188">Discussions avec des dirigeants de PME qui manquent de sécurité réseau (pare-feu vieillissants, pas d’anti-virus ou peu protecteur).</text:p>
        </text:list-item>
        <text:list-item>
          <text:p text:style-name="P189">Observations de la qualité du matériel utilisé par les clients (besoin de renouvellement) notamment les PC qui ne sont pas possible à migrer Windows 11.</text:p>
        </text:list-item>
      </text:list>
      <text:p text:style-name="Normal">– Salons et événements locaux :</text:p>
      <text:list text:style-name="LFO25" text:continue-numbering="true">
        <text:list-item>
          <text:p text:style-name="P190">Participation à Tech&amp;Fest Grenoble → découverte de nouvelles solutions cyber adaptées à la taille des clients de Konvergence 38.</text:p>
        </text:list-item>
        <text:list-item>
          <text:p text:style-name="P191">Participation à l’IT Partner sur Paris (l’entreprise est invité chaque année avec 2 places j’y suis allé l’année dernière).</text:p>
        </text:list-item>
        <text:list-item>
          <text:p text:style-name="P192">Rencontres avec des revendeurs ou grossistes → informations en avant-première sur les tendances matériel.</text:p>
        </text:list-item>
      </text:list>
      <text:p text:style-name="Normal">– Échanges avec partenaires :</text:p>
      <text:list text:style-name="LFO26" text:continue-numbering="true">
        <text:list-item>
          <text:p text:style-name="P193">Discussions informelles avec les commerciaux Microsoft ou ESET → tendances du marché PME.</text:p>
        </text:list-item>
        <text:list-item>
          <text:p text:style-name="P194">Echanges avec les associés Topas ou même les partenaires Sage (Compta), ZEENDOC…</text:p>
        </text:list-item>
        <text:list-item>
          <text:p text:style-name="P195">Retours des fournisseurs sur les stocks, prix, nouveautés par mail.</text:p>
        </text:list-item>
      </text:list>
      <text:p text:style-name="Normal">– Réseaux sociaux informels :</text:p>
      <text:list text:style-name="LFO27" text:continue-numbering="true">
        <text:list-item>
          <text:p text:style-name="P196">Groupes Grenoblois d’informaticiens ou de techniciens → échanges sur les meilleures pratiques, pannes courantes, nouveautés locales.</text:p>
        </text:list-item>
      </text:list>
      <text:p text:style-name="Normal">Intérêt pour Konvergence 38 :</text:p>
      <text:list text:style-name="LFO28" text:continue-numbering="true">
        <text:list-item>
          <text:p text:style-name="P197">Détecter les problèmes réels rencontrés par les clients.</text:p>
        </text:list-item>
        <text:list-item>
          <text:p text:style-name="P198">Repérer les tendances locales avant les concurrents.</text:p>
        </text:list-item>
        <text:list-item>
          <text:p text:style-name="P199">Adapter les offres en fonction de la demande terrain, pas seulement des données officielles.</text:p>
        </text:list-item>
      </text:list>
      <text:p text:style-name="Normal"/>
      <text:p text:style-name="Normal"/>
      <text:list text:style-name="LFO3" text:continue-numbering="true">
        <text:list-item>
          <text:p text:style-name="P200">Analyser les informations</text:p>
        </text:list-item>
      </text:list>
      <text:p text:style-name="Paragraphedeliste"/>
      <text:p text:style-name="Normal">Après avoir regroupé les données, nous analysons leur impact potentiel sur notre activité et nos clients.</text:p>
      <text:p text:style-name="Normal"><text:span text:style-name="T201">✔</text:span><text:span text:style-name="T202"><text:s/>Analyse des tendances techniques</text:span></text:p>
      <text:list text:style-name="LFO29" text:continue-numbering="true">
        <text:list-item>
          <text:p text:style-name="P203">Les alertes CERT-FR montrent une augmentation des attaques ciblant les PME locales → nous devons renforcer nos offres de cybersécurité (ESET, sauvegardes cloud, formation anti-phishing) et sensibiliser les clients sur les précautions à prendre constamment concernant les risques afin d’éviter tout problème futur.</text:p>
        </text:list-item>
        <text:list-item>
          <text:p text:style-name="P204">Les demandes fréquentes de migration vers Microsoft 365 confirment que l’usage du cloud continue de progresser → opportunité pour développer davantage notre accompagnement et nos packs M365.</text:p>
        </text:list-item>
        <text:list-item>
          <text:p text:style-name="P205">Plusieurs clients rencontrent des problèmes réseau liés à du matériel vieillissant → nécessité d’élargir nos offres de renouvellement (switches, bornes Wi-Fi, et souvent des PC plus récents que ce soit de petites tours majoritairement ou des grosses).</text:p>
        </text:list-item>
      </text:list>
      <text:p text:style-name="Normal"><text:span text:style-name="T206">✔</text:span><text:span text:style-name="T207"><text:s/>Analyse concurrentielle</text:span></text:p>
      <text:list text:style-name="LFO30" text:continue-numbering="true">
        <text:list-item>
          <text:p text:style-name="P208">Je ne ressens aucune gêne venant des concurrents locaux je ne peux pas réellement statuer sur leur impact sur l’entreprise.<text:line-break/>En général les clients que nous avons viennent du réseautage, mais certains sont aussi des anciens clients de l’entreprise où travaillait mon patron, qui ont voulut continuer à travailler avec lui.</text:p>
        </text:list-item>
      </text:list>
      <text:p text:style-name="Normal"><text:span text:style-name="T209">✔</text:span><text:span text:style-name="T210"><text:s/>Analyse commerciale</text:span></text:p>
      <text:list text:style-name="LFO31" text:continue-numbering="true">
        <text:list-item>
          <text:p text:style-name="P211">Les retours terrain montrent que la majorité des PME cherchent un interlocuteur unique et fiable → avantage stratégique pour nous car nos clients apprécient la proximité et la disponibilité de l'équipe (les appels sont répondus à 100% chaque jours et les problèmes résolus dans la journée pour les plus petits et dans la semaine en général pour les plus gros).</text:p>
        </text:list-item>
        <text:list-item>
          <text:p text:style-name="P212">En cas de problème grave nous intervenons sur site à l’instant même ou un technicien de Topas intervient.<text:line-break/>Nous apportons toujours des solutions afin de dépanner ou solutionner si possible.</text:p>
        </text:list-item>
      </text:list>
      <text:p text:style-name="Normal"><text:span text:style-name="T213">✔</text:span><text:span text:style-name="T214"><text:s/>Conclusion interne</text:span></text:p>
      <text:p text:style-name="Normal">L’analyse confirme que nos priorités doivent être :</text:p>
      <text:list text:style-name="LFO32" text:continue-numbering="true">
        <text:list-item>
          <text:p text:style-name="P215">Renforcer la cybersécurité</text:p>
        </text:list-item>
        <text:list-item>
          <text:p text:style-name="P216">Développer le cloud et la maintenance proactive</text:p>
        </text:list-item>
        <text:list-item>
          <text:p text:style-name="P217">Moderniser nos offres réseau</text:p>
        </text:list-item>
      </text:list>
      <text:p text:style-name="Normal"/>
      <text:p text:style-name="Normal"/>
      <text:p text:style-name="Normal"/>
      <text:p text:style-name="Normal"/>
      <text:p text:style-name="Normal"/>
      <text:p text:style-name="Normal"/>
      <text:soft-page-break/>
      <text:list text:style-name="LFO3" text:continue-numbering="true">
        <text:list-item>
          <text:p text:style-name="P218">Diffuser l’information</text:p>
        </text:list-item>
      </text:list>
      <text:p text:style-name="Paragraphedeliste"/>
      <text:p text:style-name="Normal">Pour que la veille soit utile, elle doit être partagée avec les équipes internes dont les associés avec qui ont est très proche (on ne touche pas au même secteur d’activité à 100% mais on fait 80% du temps la même chose même si ils touchent un secteur plus large on ne s’empiète pas les uns sur les autres).</text:p>
      <text:p text:style-name="Normal"><text:span text:style-name="T219">✔</text:span><text:span text:style-name="T220"><text:s/>Diffusion en interne chez Konvergence 38</text:span></text:p>
      <text:list text:style-name="LFO33" text:continue-numbering="true">
        <text:list-item>
          <text:p text:style-name="P221"><text:span text:style-name="T222">Points effectué chaque jour<text:s/></text:span><text:s/>: je présente les informations importantes (failles de sécurité, demandes clients récurrentes, évolution des concurrents) s’il y en a et fait un point avec le patron sur les problèmes toujours a réglé.</text:p>
        </text:list-item>
        <text:list-item>
          <text:p text:style-name="P223"><text:span text:style-name="T224">Mails internes</text:span><text:s/>: un résumé rapide est envoyé en cas de faille critique ou d’information urgente à traiter pour nos clients ou même simplement pour faire un rappel de ce que je n’ai pas finit si on est par exemple vendredi et que la semaine d’après je suis à l’école.</text:p>
        </text:list-item>
        <text:list-item>
          <text:p text:style-name="P225"><text:span text:style-name="T226">Briefs commerciaux</text:span><text:s/>: les commerciaux reçoivent les points clés (nouveaux services, opportunités identifiées) pour adapter leur discours.</text:p>
        </text:list-item>
      </text:list>
      <text:p text:style-name="Normal"><text:span text:style-name="T227">✔</text:span><text:span text:style-name="T228"><text:s/>Objectif de la diffusion</text:span></text:p>
      <text:p text:style-name="Normal">Permettre à toute l’équipe d’adapter son travail :<text:line-break/>→ techniciens (sécurité, mises à jour),<text:line-break/>→ commerciaux (nouveaux besoins clients),<text:line-break/>→ direction (décisions stratégiques).</text:p>
      <text:p text:style-name="Normal"/>
      <text:p text:style-name="Normal"/>
      <text:p text:style-name="Normal"/>
      <text:p text:style-name="Normal"/>
      <text:p text:style-name="Normal"/>
      <text:p text:style-name="Normal"/>
      <text:p text:style-name="Normal"/>
      <text:p text:style-name="Normal"/>
      <text:p text:style-name="Normal"/>
      <text:soft-page-break/>
      <text:list text:style-name="LFO3" text:continue-numbering="true">
        <text:list-item>
          <text:p text:style-name="P229">Sauvegarder les résultats</text:p>
        </text:list-item>
      </text:list>
      <text:p text:style-name="Paragraphedeliste"/>
      <text:p text:style-name="Normal">Enfin, toutes les données et analyses doivent être archivées pour assurer une continuité et un suivi de la veille.</text:p>
      <text:p text:style-name="Normal"><text:span text:style-name="T230">✔</text:span><text:span text:style-name="T231"><text:s/>Méthodes de sauvegarde utilisées dans l’entreprise</text:span></text:p>
      <text:list text:style-name="LFO33" text:continue-numbering="true">
        <text:list-item>
          <text:p text:style-name="P232">Méthode en général très simple : vérification et adaptation aux nouvelles technologiques instantanés (en général le patron commande un nouveau produit ou simplement un produit qui a l’air intéressant et nous le testons au bureau notamment avec les serveurs nous venons de commencer à faire du Serveur Lenovo et plus uniquement du serveur HPE).</text:p>
        </text:list-item>
      </text:list>
      <text:p text:style-name="Normal"><text:span text:style-name="T233">✔</text:span><text:span text:style-name="T234"><text:s/>Intérêt de la sauvegarde</text:span></text:p>
      <text:list text:style-name="LFO34" text:continue-numbering="true">
        <text:list-item>
          <text:p text:style-name="P235">Permet d’avoir un<text:s/><text:span text:style-name="T236">historique complet de l’évolution du marché</text:span><text:s/>et des besoins clients locaux.</text:p>
        </text:list-item>
        <text:list-item>
          <text:p text:style-name="P237">Facilite la préparation de futures décisions commerciales et techniques.</text:p>
        </text:list-item>
        <text:list-item>
          <text:p text:style-name="P238">Sert de base à la mise à jour régulière de notre stratégie interne.</text:p>
        </text:list-item>
        <text:list-item>
          <text:p text:style-name="P239">Il y a aussi un dossier de site présent pour chaque client et nous mettons de temps en temps les pc utilisés ou les modèles de serveurs afin d’avoir des retours sur ces derniers et savoir s’ils sont bien<text:s/>conformes<text:s/>à 100% comme ce que nous en avions pensé durant les tests au bureau.</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ymbol" svg:font-family="Segoe UI Symbol"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style:font-name-asian="Aptos" style:font-name-complex="Times New Roman" fo:font-weight="bold" style:font-weight-asian="bold"/>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Symbol"/>
      </text:list-level-style-bullet>
      <text:list-level-style-bullet text:level="2" text:style-name="WW_CharLFO1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1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1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1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1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1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1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1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2"/>
      <number:text>%2%)</number:text>
    </number:num-list-format>
    <number:num-list-format style:name="NLF2">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oi</meta:initial-creator>
    <dc:creator>Mohamed Aymen LOURAGHI (mlouraghi)</dc:creator>
    <meta:creation-date>2025-12-01T09:05:00Z</meta:creation-date>
    <dc:date>2026-04-15T07:11:00Z</dc:date>
    <meta:template xlink:href="Normal" xlink:type="simple"/>
    <meta:editing-cycles>42</meta:editing-cycles>
    <meta:editing-duration>PT7620S</meta:editing-duration>
    <meta:document-statistic meta:page-count="13" meta:paragraph-count="30" meta:word-count="2373" meta:character-count="15395" meta:row-count="108" meta:non-whitespace-character-count="13052"/>
  </office:meta>
</office:document-meta>
</file>